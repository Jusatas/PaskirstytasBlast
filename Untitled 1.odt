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0834b2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Preformatted_20_Text">
      <style:text-properties fo:language="lt" fo:country="LT"/>
    </style:style>
    <style:style style:name="P5" style:family="paragraph" style:parent-style-name="Text_20_body">
      <style:text-properties fo:language="lt" fo:country="LT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3">
      <style:paragraph-properties fo:break-before="page"/>
      <style:text-properties officeooo:paragraph-rsid="00138187"/>
    </style:style>
    <style:style style:name="P8" style:family="paragraph" style:parent-style-name="Heading_20_3" style:list-style-name="">
      <style:paragraph-properties fo:break-before="page"/>
    </style:style>
    <style:style style:name="P9" style:family="paragraph" style:parent-style-name="Heading_20_3">
      <style:text-properties officeooo:rsid="00154b96" officeooo:paragraph-rsid="00154b96"/>
    </style:style>
    <style:style style:name="P10" style:family="paragraph" style:parent-style-name="Heading_20_3">
      <style:text-properties officeooo:rsid="0016402f" officeooo:paragraph-rsid="0016402f"/>
    </style:style>
    <style:style style:name="P11" style:family="paragraph" style:parent-style-name="Heading_20_3">
      <style:text-properties officeooo:paragraph-rsid="0018e8a5"/>
    </style:style>
    <style:style style:name="P12" style:family="paragraph" style:parent-style-name="Heading_20_4">
      <style:text-properties officeooo:paragraph-rsid="0011a76c"/>
    </style:style>
    <style:style style:name="P13" style:family="paragraph" style:parent-style-name="Heading_20_4">
      <style:text-properties officeooo:rsid="0016402f" officeooo:paragraph-rsid="0016402f"/>
    </style:style>
    <style:style style:name="P14" style:family="paragraph" style:parent-style-name="Preformatted_20_Text">
      <style:text-properties officeooo:paragraph-rsid="00101969"/>
    </style:style>
    <style:style style:name="P15" style:family="paragraph" style:parent-style-name="Preformatted_20_Text">
      <style:text-properties officeooo:paragraph-rsid="0011a76c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11a76c"/>
    </style:style>
    <style:style style:name="P17" style:family="paragraph" style:parent-style-name="Preformatted_20_Text">
      <style:text-properties fo:language="lt" fo:country="LT"/>
    </style:style>
    <style:style style:name="P18" style:family="paragraph" style:parent-style-name="Preformatted_20_Text">
      <style:text-properties fo:language="lt" fo:country="LT" officeooo:paragraph-rsid="0011a76c"/>
    </style:style>
    <style:style style:name="P19" style:family="paragraph" style:parent-style-name="Preformatted_20_Text">
      <style:text-properties fo:language="lt" fo:country="LT" officeooo:rsid="0011a76c" officeooo:paragraph-rsid="0011a76c"/>
    </style:style>
    <style:style style:name="P20" style:family="paragraph" style:parent-style-name="Preformatted_20_Text">
      <style:text-properties fo:font-size="12pt" officeooo:rsid="0011a76c" officeooo:paragraph-rsid="0011a76c" style:font-size-asian="10.5pt" style:font-size-complex="12pt"/>
    </style:style>
    <style:style style:name="P21" style:family="paragraph" style:parent-style-name="Text_20_body" style:list-style-name="L1">
      <style:text-properties officeooo:paragraph-rsid="000bc111"/>
    </style:style>
    <style:style style:name="P22" style:family="paragraph" style:parent-style-name="Text_20_body" style:list-style-name="L1">
      <style:text-properties officeooo:paragraph-rsid="000c9e89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in" fo:margin-bottom="0in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in" fo:margin-bottom="0in" style:contextual-spacing="false"/>
    </style:style>
    <style:style style:name="P27" style:family="paragraph" style:parent-style-name="Text_20_body" style:list-style-name="L4">
      <style:paragraph-properties fo:margin-top="0in" fo:margin-bottom="0in" style:contextual-spacing="false"/>
      <style:text-properties fo:language="lt" fo:country="LT"/>
    </style:style>
    <style:style style:name="P28" style:family="paragraph" style:parent-style-name="Text_20_body" style:list-style-name="L4">
      <style:text-properties fo:language="lt" fo:country="LT"/>
    </style:style>
    <style:style style:name="P29" style:family="paragraph" style:parent-style-name="Text_20_body" style:list-style-name="L5">
      <style:paragraph-properties fo:margin-top="0in" fo:margin-bottom="0in" style:contextual-spacing="false"/>
      <style:text-properties fo:language="lt" fo:country="LT"/>
    </style:style>
    <style:style style:name="P30" style:family="paragraph" style:parent-style-name="Text_20_body" style:list-style-name="L5">
      <style:text-properties fo:language="lt" fo:country="LT"/>
    </style:style>
    <style:style style:name="P31" style:family="paragraph" style:parent-style-name="Text_20_body" style:list-style-name="L6">
      <style:paragraph-properties fo:margin-top="0in" fo:margin-bottom="0in" style:contextual-spacing="false"/>
      <style:text-properties fo:language="lt" fo:country="LT"/>
    </style:style>
    <style:style style:name="P32" style:family="paragraph" style:parent-style-name="Text_20_body" style:list-style-name="L6">
      <style:text-properties fo:language="lt" fo:country="LT"/>
    </style:style>
    <style:style style:name="P33" style:family="paragraph" style:parent-style-name="Text_20_body" style:list-style-name="L7">
      <style:paragraph-properties fo:margin-top="0in" fo:margin-bottom="0in" style:contextual-spacing="false"/>
      <style:text-properties fo:language="lt" fo:country="LT"/>
    </style:style>
    <style:style style:name="P34" style:family="paragraph" style:parent-style-name="Text_20_body" style:list-style-name="L7">
      <style:text-properties fo:language="lt" fo:country="LT"/>
    </style:style>
    <style:style style:name="P35" style:family="paragraph" style:parent-style-name="Text_20_body">
      <style:text-properties fo:language="lt" fo:country="LT" officeooo:rsid="000c9e89"/>
    </style:style>
    <style:style style:name="P36" style:family="paragraph" style:parent-style-name="Text_20_body" style:list-style-name="L8"/>
    <style:style style:name="P37" style:family="paragraph" style:parent-style-name="Text_20_body" style:list-style-name="L8">
      <style:paragraph-properties fo:margin-top="0in" fo:margin-bottom="0in" style:contextual-spacing="false"/>
    </style:style>
    <style:style style:name="P38" style:family="paragraph" style:parent-style-name="Text_20_body" style:list-style-name="L8">
      <style:paragraph-properties fo:margin-top="0in" fo:margin-bottom="0in" style:contextual-spacing="false" style:writing-mode="lr-tb"/>
      <style:text-properties officeooo:paragraph-rsid="0013ce49"/>
    </style:style>
    <style:style style:name="P39" style:family="paragraph" style:parent-style-name="Text_20_body">
      <style:text-properties officeooo:paragraph-rsid="000c9e89"/>
    </style:style>
    <style:style style:name="P40" style:family="paragraph" style:parent-style-name="Text_20_body">
      <style:text-properties officeooo:paragraph-rsid="00101969"/>
    </style:style>
    <style:style style:name="P41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42" style:family="paragraph" style:parent-style-name="Text_20_body">
      <style:text-properties officeooo:paragraph-rsid="00154b96"/>
    </style:style>
    <style:style style:name="P43" style:family="paragraph" style:parent-style-name="Text_20_body" style:list-style-name="L9">
      <style:text-properties officeooo:rsid="0016402f" officeooo:paragraph-rsid="0016402f"/>
    </style:style>
    <style:style style:name="P44" style:family="paragraph" style:parent-style-name="Text_20_body" style:list-style-name="L10">
      <style:text-properties officeooo:rsid="0016402f" officeooo:paragraph-rsid="0016402f"/>
    </style:style>
    <style:style style:name="P45" style:family="paragraph" style:parent-style-name="Text_20_body" style:list-style-name="L10">
      <style:text-properties officeooo:rsid="00182afe" officeooo:paragraph-rsid="00182afe"/>
    </style:style>
    <style:style style:name="P46" style:family="paragraph" style:parent-style-name="Text_20_body">
      <style:text-properties officeooo:paragraph-rsid="0018e8a5"/>
    </style:style>
    <style:style style:name="P47" style:family="paragraph" style:parent-style-name="Text_20_body" style:list-style-name="L10">
      <style:text-properties officeooo:rsid="001a8fc8" officeooo:paragraph-rsid="001a8fc8"/>
    </style:style>
    <style:style style:name="P48" style:family="paragraph" style:parent-style-name="Text_20_body" style:list-style-name="L10">
      <style:text-properties officeooo:rsid="001c9a2e" officeooo:paragraph-rsid="001c9a2e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0bc111"/>
    </style:style>
    <style:style style:name="T3" style:family="text">
      <style:text-properties fo:language="lt" fo:country="LT" officeooo:rsid="000c9e89"/>
    </style:style>
    <style:style style:name="T4" style:family="text">
      <style:text-properties fo:language="lt" fo:country="LT" officeooo:rsid="00101969"/>
    </style:style>
    <style:style style:name="T5" style:family="text">
      <style:text-properties fo:language="lt" fo:country="LT" officeooo:rsid="0011a76c"/>
    </style:style>
    <style:style style:name="T6" style:family="text">
      <style:text-properties fo:language="lt" fo:country="LT" officeooo:rsid="00138187"/>
    </style:style>
    <style:style style:name="T7" style:family="text">
      <style:text-properties fo:language="lt" fo:country="LT" fo:font-weight="normal" style:font-weight-asian="normal" style:font-weight-complex="normal"/>
    </style:style>
    <style:style style:name="T8" style:family="text">
      <style:text-properties fo:language="lt" fo:country="LT" fo:font-weight="normal" officeooo:rsid="0013ce49" style:font-weight-asian="normal" style:font-weight-complex="normal"/>
    </style:style>
    <style:style style:name="T9" style:family="text">
      <style:text-properties fo:language="lt" fo:country="LT" officeooo:rsid="0016402f"/>
    </style:style>
    <style:style style:name="T10" style:family="text">
      <style:text-properties fo:language="lt" fo:country="LT" officeooo:rsid="00154b96"/>
    </style:style>
    <style:style style:name="T11" style:family="text">
      <style:text-properties fo:language="lt" fo:country="LT" officeooo:rsid="0018e8a5"/>
    </style:style>
    <style:style style:name="T12" style:family="text">
      <style:text-properties officeooo:rsid="000c9e89"/>
    </style:style>
    <style:style style:name="T13" style:family="text">
      <style:text-properties officeooo:rsid="00101969"/>
    </style:style>
    <style:style style:name="T14" style:family="text">
      <style:text-properties fo:font-size="12pt" fo:language="lt" fo:country="LT" style:font-size-asian="12pt" style:font-size-complex="12pt"/>
    </style:style>
    <style:style style:name="T15" style:family="text">
      <style:text-properties fo:font-size="12pt" fo:language="lt" fo:country="LT" officeooo:rsid="000c9e89" style:font-size-asian="12pt" style:font-size-complex="12pt"/>
    </style:style>
    <style:style style:name="T16" style:family="text">
      <style:text-properties fo:font-size="12pt" fo:language="lt" fo:country="LT" officeooo:rsid="00101969" style:font-size-asian="12pt" style:font-size-complex="12pt"/>
    </style:style>
    <style:style style:name="T17" style:family="text">
      <style:text-properties fo:font-size="12pt" fo:language="lt" fo:country="LT" officeooo:rsid="00103bd4" style:font-size-asian="12pt" style:font-size-complex="12pt"/>
    </style:style>
    <style:style style:name="T18" style:family="text">
      <style:text-properties fo:font-size="12pt" fo:language="lt" fo:country="LT" officeooo:rsid="0011a76c" style:font-size-asian="12pt" style:font-size-complex="12pt"/>
    </style:style>
    <style:style style:name="T19" style:family="text">
      <style:text-properties officeooo:rsid="00103bd4"/>
    </style:style>
    <style:style style:name="T20" style:family="text">
      <style:text-properties officeooo:rsid="0011a76c"/>
    </style:style>
    <style:style style:name="T21" style:family="text">
      <style:text-properties officeooo:rsid="00138187"/>
    </style:style>
    <style:style style:name="T22" style:family="text">
      <style:text-properties officeooo:rsid="00154b96"/>
    </style:style>
    <style:style style:name="T23" style:family="text">
      <style:text-properties officeooo:rsid="0018e8a5"/>
    </style:style>
    <style:style style:name="T24" style:family="text">
      <style:text-properties officeooo:rsid="001a5c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text:span text:style-name="Source_20_Text"><text:span text:style-name="T23">Failų medis</text:span></text:span></text:h>
      <text:p text:style-name="P46"><text:span text:style-name="Source_20_Text">.</text:span></text:p>
      <text:p text:style-name="P46"><text:span text:style-name="Source_20_Text">├── build_indexes</text:span></text:p>
      <text:p text:style-name="P46"><text:span text:style-name="Source_20_Text">├── central/</text:span></text:p>
      <text:p text:style-name="P46"><text:span text:style-name="Source_20_Text">│   ├── Dockerfile</text:span></text:p>
      <text:p text:style-name="P46"><text:span text:style-name="Source_20_Text">│   ├── main.py</text:span></text:p>
      <text:p text:style-name="P46"><text:span text:style-name="Source_20_Text">│   └── requirements.txt</text:span></text:p>
      <text:p text:style-name="P46"><text:span text:style-name="Source_20_Text">├── data/</text:span></text:p>
      <text:p text:style-name="P46"><text:span text:style-name="Source_20_Text">├── docker-compose.yml</text:span></text:p>
      <text:p text:style-name="P46"><text:span text:style-name="Source_20_Text">├── start_workers</text:span></text:p>
      <text:p text:style-name="P46"><text:span text:style-name="Source_20_Text">├── stop_workers</text:span></text:p>
      <text:p text:style-name="P46"><text:span text:style-name="Source_20_Text">└── worker/</text:span></text:p>
      <text:p text:style-name="P46"><text:span text:style-name="Source_20_Text"><text:s text:c="4"/>├── Dockerfile</text:span></text:p>
      <text:p text:style-name="P46"><text:span text:style-name="Source_20_Text"><text:s text:c="4"/>├── main.py</text:span></text:p>
      <text:p text:style-name="P46"><text:span text:style-name="Source_20_Text"><text:s text:c="4"/>└── requirements.txt</text:span></text:p>
      <text:p text:style-name="P46"><text:span text:style-name="Source_20_Text"/></text:p>
      <text:p text:style-name="P46"><text:span text:style-name="Source_20_Text"><text:span text:style-name="T23">start_workers, stop_workers – lokaliam darbinių mazgų paleidimui ir stabdymui</text:span></text:span></text:p>
      <text:p text:style-name="P46"><text:span text:style-name="Source_20_Text"><text:span text:style-name="T23">build_indexes – MMSeqs2 indeksavimo paleidimas (reikalinga dėl </text:span></text:span><text:a xlink:type="simple" xlink:href="#1.1.6.1.Problemos|outline" text:style-name="Internet_20_link" text:visited-style-name="Visited_20_Internet_20_Link"><text:span text:style-name="Source_20_Text"><text:span text:style-name="T23">problemos</text:span></text:span></text:a><text:span text:style-name="Source_20_Text"><text:span text:style-name="T23">)</text:span></text:span></text:p>
      <text:h text:style-name="P8" text:outline-level="3"><text:span text:style-name="Source_20_Text">Užklausos kelias</text:span></text:h>
      <text:list text:style-name="L1">
        <text:list-header>
          <text:p text:style-name="P21"><text:span text:style-name="Source_20_Text"><text:span text:style-name="T2"/></text:span></text:p>
        </text:list-header>
        <text:list-item>
          <text:p text:style-name="P21"><text:span text:style-name="Source_20_Text"><text:span text:style-name="T2">Vartotojas siunčia užklausą su DNR seka POST metodu į centrinį mazgą</text:span></text:span></text:p>
        </text:list-item>
        <text:list-item>
          <text:p text:style-name="P21"><text:span text:style-name="Source_20_Text"><text:span text:style-name="T2">Centrinis mazgas ištransliuoja seką visiems darbiniams mazgams async HTTP užklausomis</text:span></text:span></text:p>
        </text:list-item>
        <text:list-item>
          <text:p text:style-name="P21"><text:span text:style-name="Source_20_Text"><text:span text:style-name="T2">Kiekvienas darbinis mazgas perskaito užklausą, konvertuoja ją į MMSeqs2 vidinį formatą ir lygina ją su turimais duomenimis</text:span></text:span></text:p>
        </text:list-item>
        <text:list-item>
          <text:p text:style-name="P21"><text:span text:style-name="Source_20_Text"><text:span text:style-name="T2">Kiekvienas darbinis mazgas grąžina po sąrašą pilnų sekų, kurios pakankamai gerai atitiko prieš tai gautą užklausą</text:span></text:span></text:p>
        </text:list-item>
        <text:list-item>
          <text:p text:style-name="P21"><text:span text:style-name="Source_20_Text"><text:span text:style-name="T2">Centriniui mazgui sulaukus visų darbinių atsako, jis sukuria laikiną FASTA failą </text:span></text:span><text:span text:style-name="Source_20_Text"><text:span text:style-name="T3">su visais sulauktais kandidatais, </text:span></text:span><text:span text:style-name="Source_20_Text"><text:span text:style-name="T11">deduplikuoja</text:span></text:span></text:p>
        </text:list-item>
        <text:list-item>
          <text:p text:style-name="P22"><text:span text:style-name="Source_20_Text"><text:span text:style-name="T3">Su FASTA failu paleidžiamas pilnas blastn tarp kandidatų, sukuriama statistika</text:span></text:span></text:p>
        </text:list-item>
        <text:list-item>
          <text:p text:style-name="P22"><text:span text:style-name="Source_20_Text"><text:span text:style-name="T3">Centrinis mazgas grąžina JSON su geriausiais rezultatais, kiek laiko viskas užtruko, grąžiai suformatuota ataskaita.</text:span></text:span></text:p>
        </text:list-item>
      </text:list>
      <text:h text:style-name="P6" text:outline-level="3"><text:span text:style-name="Source_20_Text">Sistemos paleidimas</text:span></text:h>
      <text:p text:style-name="P39"><text:span text:style-name="Source_20_Text"><text:span text:style-name="T12">Yra du būdai paleisti sistemą – </text:span></text:span><text:span text:style-name="Source_20_Text"><text:span text:style-name="T13">paprastas ir Docker</text:span></text:span></text:p>
      <text:p text:style-name="P39"><text:span text:style-name="Source_20_Text"/></text:p>
      <text:p text:style-name="P40"><text:span text:style-name="Source_20_Text"><text:span text:style-name="T13">Paleidimui reikalingi duomenys – data/ direktorijoje į shard1, shard2, shard3, shard4 suskirstyti FASTA </text:span></text:span><text:span text:style-name="Source_20_Text"><text:span text:style-name="T19">failai.</text:span></text:span></text:p>
      <text:p text:style-name="P40"><text:span text:style-name="Source_20_Text"/></text:p>
      <text:p text:style-name="P40"><text:span text:style-name="Source_20_Text"><text:span text:style-name="T13">Pavyzdinius duomenis galima pa</text:span></text:span><text:span text:style-name="Source_20_Text"><text:span text:style-name="T19">ruošti</text:span></text:span><text:span text:style-name="Source_20_Text"><text:span text:style-name="T13"> taip:</text:span></text:span></text:p>
      <text:p text:style-name="P14"><text:span text:style-name="Source_20_Text"><text:span text:style-name="T1">wget -P data/ </text:span></text:span><text:a xlink:type="simple" xlink:href="ftp://ftp.sra.ebi.ac.uk/vol1/fastq/SRR258/003/SRR2584863/SRR2584863_1.fastq.gz" text:style-name="Internet_20_link" text:visited-style-name="Visited_20_Internet_20_Link"><text:span text:style-name="Source_20_Text"><text:span text:style-name="T1">ftp://ftp.sra.ebi.ac.uk/vol1/fastq/SRR258/003/SRR2584863/SRR2584863_1.fastq.gz</text:span></text:span></text:a></text:p>
      <text:p text:style-name="P14"><text:span text:style-name="Source_20_Text"><text:span text:style-name="T4">(~175mb)<text:line-break/><text:line-break/></text:span></text:span><text:span text:style-name="Source_20_Text"><text:span text:style-name="T15">Konvertuojame FASTQ į FAST</text:span></text:span><text:span text:style-name="Source_20_Text"><text:span text:style-name="T16">A</text:span></text:span></text:p>
      <text:p text:style-name="P14"><text:span text:style-name="Source_20_Text"><text:span text:style-name="T4">zcat data/SRR2584863_1.fastq.gz | head -1600000 | awk 'NR%4==1{print "&gt;"substr($0,2)} NR%4==2{print}' &gt; data/all_reads.fasta</text:span></text:span></text:p>
      <text:p text:style-name="P14"><text:span text:style-name="Source_20_Text"><text:span text:style-name="T16"/></text:span></text:p>
      <text:p text:style-name="P15"><text:span text:style-name="Source_20_Text"><text:span text:style-name="T17">Padilinimas į 4 dalis po 100,000 </text:span></text:span></text:p>
      <text:p text:style-name="P15"><text:span text:style-name="Source_20_Text"><text:span text:style-name="T1">python3 -c "</text:span></text:span></text:p>
      <text:p text:style-name="P15"><text:span text:style-name="Source_20_Text"><text:span text:style-name="T1">total_reads = 400000</text:span></text:span></text:p>
      <text:p text:style-name="P15"><text:span text:style-name="Source_20_Text"><text:span text:style-name="T1">per_shard = total_reads // 4</text:span></text:span></text:p>
      <text:p text:style-name="P15"><text:span text:style-name="Source_20_Text"><text:span text:style-name="T1">outfiles = [open(f'data/shard_{i+1}.fasta', 'w') for i in range(4)]</text:span></text:span></text:p>
      <text:p text:style-name="P15"><text:span text:style-name="Source_20_Text"><text:span text:style-name="T1">read_count = 0</text:span></text:span></text:p>
      <text:p text:style-name="P15"><text:span text:style-name="Source_20_Text"><text:span text:style-name="T1">with open('data/all_reads.fasta') as f:</text:span></text:span></text:p>
      <text:p text:style-name="P15"><text:span text:style-name="Source_20_Text"><text:span text:style-name="T1"><text:s text:c="4"/>for line in f:</text:span></text:span></text:p>
      <text:p text:style-name="P15"><text:span text:style-name="Source_20_Text"><text:span text:style-name="T1"><text:s text:c="8"/>if line.startswith('&gt;'):</text:span></text:span></text:p>
      <text:p text:style-name="P15"><text:span text:style-name="Source_20_Text"><text:span text:style-name="T1"><text:s text:c="12"/>shard_idx = min(read_count // per_shard, 3)</text:span></text:span></text:p>
      <text:p text:style-name="P15"><text:span text:style-name="Source_20_Text"><text:span text:style-name="T1"><text:s text:c="12"/>read_count += 1</text:span></text:span></text:p>
      <text:p text:style-name="P15"><text:span text:style-name="Source_20_Text"><text:span text:style-name="T1"><text:s text:c="8"/>outfiles[shard_idx].write(line)</text:span></text:span></text:p>
      <text:p text:style-name="P15"><text:span text:style-name="Source_20_Text"><text:span text:style-name="T4">for f in outfiles: f.close()“</text:span></text:span></text:p>
      <text:p text:style-name="P15"><text:span text:style-name="Source_20_Text"><text:span text:style-name="T4"/></text:span></text:p>
      <text:p text:style-name="P15"><text:span text:style-name="Source_20_Text"><text:span text:style-name="T14">MMseqs2 inde</text:span></text:span><text:span text:style-name="Source_20_Text"><text:span text:style-name="T18">ksų sukūrimas</text:span></text:span><text:span text:style-name="Source_20_Text"><text:span text:style-name="T14"> (</text:span></text:span><text:span text:style-name="Source_20_Text"><text:span text:style-name="T18">kol kas daromas ne izoliuotai dockeryje, nes trūksta kompiuterio resursų</text:span></text:span><text:span text:style-name="Source_20_Text"><text:span text:style-name="T14">)</text:span></text:span></text:p>
      <text:p text:style-name="P15"><text:span text:style-name="Source_20_Text"><text:span text:style-name="T4">./build_indexes</text:span></text:span></text:p>
      <text:p text:style-name="P14"><text:span text:style-name="Source_20_Text"><text:span text:style-name="T4"/></text:span></text:p>
      <text:p text:style-name="P14"><text:span text:style-name="Source_20_Text"><text:span text:style-name="T4"/></text:span></text:p>
      <text:h text:style-name="Heading_20_4" text:outline-level="4"><text:span text:style-name="Source_20_Text">Paprastasis </text:span><text:span text:style-name="Source_20_Text"><text:span text:style-name="T20">paleidimas</text:span></text:span><text:span text:style-name="Source_20_Text">:</text:span></text:h>
      <text:p text:style-name="Preformatted_20_Text"><text:span text:style-name="Source_20_Text"><text:span text:style-name="T1">sudo apt install mmseqs2 ncbi-blast+</text:span></text:span></text:p>
      <text:p text:style-name="Preformatted_20_Text"><text:span text:style-name="Source_20_Text"><text:span text:style-name="T1">python3 -m venv .venv</text:span></text:span></text:p>
      <text:p text:style-name="Preformatted_20_Text"><text:span text:style-name="Source_20_Text"><text:span text:style-name="T1">source .venv/bin/activate</text:span></text:span></text:p>
      <text:p text:style-name="Preformatted_20_Text"><text:span text:style-name="Source_20_Text"><text:span text:style-name="T1">pip install -r worker/requirements.txt</text:span></text:span></text:p>
      <text:p text:style-name="Preformatted_20_Text"><text:span text:style-name="Source_20_Text"><text:span text:style-name="T1">pip install -r central/requirements.txt</text:span></text:span></text:p>
      <text:p text:style-name="P18"><text:span text:style-name="Source_20_Text">./start_workers</text:span></text:p>
      <text:p text:style-name="P20">Kitame terminale:</text:p>
      <text:p text:style-name="P16"><text:span text:style-name="Source_20_Text"><text:span text:style-name="T1">uvicorn central.main:app --port 8080</text:span></text:span></text:p>
      <text:h text:style-name="P12" text:outline-level="4"><text:span text:style-name="Source_20_Text"><text:span text:style-name="T5">Paleidimas su Docker:</text:span></text:span></text:h>
      <text:p text:style-name="Preformatted_20_Text"><text:span text:style-name="Source_20_Text"><text:span text:style-name="T1">docker compose up</text:span></text:span></text:p>
      <text:p text:style-name="P19">(Mano kompiuteryje Docker buvo priskirta 12GB RAM.)</text:p>
      <text:p text:style-name="P4"/>
      <text:p text:style-name="P35"/>
      <text:h text:style-name="P7" text:outline-level="3"><text:span text:style-name="Strong_20_Emphasis"><text:span text:style-name="T21">Sistemos vidinė komunikacija</text:span></text:span></text:h>
      <text:p text:style-name="Text_20_body"><text:span text:style-name="Strong_20_Emphasis"><text:span text:style-name="T1">Request </text:span></text:span><text:span text:style-name="Strong_20_Emphasis"><text:span text:style-name="T6">laukeliai</text:span></text:span><text:span text:style-name="Strong_20_Emphasis"><text:span text:style-name="T1">:</text:span></text:span></text:p>
      <text:list text:style-name="L2">
        <text:list-item>
          <text:p text:style-name="P24"><text:span text:style-name="Source_20_Text"><text:span text:style-name="T1">sequence</text:span></text:span><text:span text:style-name="T1"> – </text:span><text:span text:style-name="T6">seka, pagal kurią ieškoma</text:span><text:span text:style-name="T1"> </text:span></text:p>
        </text:list-item>
        <text:list-item>
          <text:p text:style-name="P24"><text:span text:style-name="Source_20_Text"><text:span text:style-name="T1">query_id</text:span></text:span><text:span text:style-name="T1"> - </text:span><text:span text:style-name="T6">užklausos ID</text:span></text:p>
        </text:list-item>
        <text:list-item>
          <text:p text:style-name="P23"><text:span text:style-name="Source_20_Text"><text:span text:style-name="T1">top_n</text:span></text:span><text:span text:style-name="T1"> – </text:span><text:span text:style-name="T6">neprivalomas argumentas, nurodantis kiek rezultatų norime gauti atsake</text:span></text:p>
        </text:list-item>
      </text:list>
      <text:p text:style-name="Text_20_body"><text:span text:style-name="Strong_20_Emphasis"><text:span text:style-name="T1">Response </text:span></text:span><text:span text:style-name="Strong_20_Emphasis"><text:span text:style-name="T6">laukeliai</text:span></text:span><text:span text:style-name="Strong_20_Emphasis"><text:span text:style-name="T1">:</text:span></text:span></text:p>
      <text:list text:style-name="L3">
        <text:list-item>
          <text:p text:style-name="P26"><text:span text:style-name="Source_20_Text"><text:span text:style-name="T1">query_id</text:span></text:span><text:span text:style-name="T1"> - </text:span><text:span text:style-name="T6">u-klausos ID</text:span></text:p>
        </text:list-item>
        <text:list-item>
          <text:p text:style-name="P26"><text:span text:style-name="Source_20_Text"><text:span text:style-name="T1">query_length</text:span></text:span><text:span text:style-name="T1"> - </text:span><text:span text:style-name="T6">bazių porų kiekis užklausoje</text:span></text:p>
        </text:list-item>
        <text:list-item>
          <text:p text:style-name="P26"><text:span text:style-name="Source_20_Text"><text:span text:style-name="T1">workers_queried</text:span></text:span><text:span text:style-name="T1"> - </text:span><text:span text:style-name="T6">darbinių mazgų veikimo kiekis</text:span></text:p>
        </text:list-item>
        <text:list-item>
          <text:p text:style-name="P26"><text:span text:style-name="Source_20_Text"><text:span text:style-name="T1">worker_stats</text:span></text:span><text:span text:style-name="T1"> - </text:span><text:span text:style-name="T6">kiekvieno darbinio mazgo statistika</text:span></text:p>
        </text:list-item>
        <text:list-item>
          <text:p text:style-name="P26"><text:span text:style-name="Source_20_Text"><text:span text:style-name="T1">candidates_after_dedup</text:span></text:span><text:span text:style-name="T1"> – </text:span><text:span text:style-name="T6">suma visų darbinių mazgų grąžintų rezultatų</text:span></text:p>
        </text:list-item>
        <text:list-item>
          <text:p text:style-name="P26"><text:span text:style-name="Source_20_Text"><text:span text:style-name="T1">hits</text:span></text:span><text:span text:style-name="T1"> - </text:span><text:span text:style-name="T6">BLAST rezultatas</text:span></text:p>
        </text:list-item>
        <text:list-item>
          <text:p text:style-name="P26"><text:span text:style-name="Source_20_Text"><text:span text:style-name="T1">report</text:span></text:span><text:span text:style-name="T1"> – </text:span><text:span text:style-name="T6">žmogui skirta ataskaita</text:span></text:p>
        </text:list-item>
        <text:list-item>
          <text:p text:style-name="P25"><text:span text:style-name="Source_20_Text"><text:span text:style-name="T1">total_pipeline_time_seconds</text:span></text:span><text:span text:style-name="T1"> – </text:span><text:span text:style-name="T6">sekundžių kiekis tarp užklausos gavimo ir šio atsako</text:span><text:span text:style-name="T1"> </text:span></text:p>
        </text:list-item>
      </text:list>
      <text:p text:style-name="Text_20_body"/>
      <text:p text:style-name="P3"><text:span text:style-name="Strong_20_Emphasis"><text:span text:style-name="T1"/></text:span></text:p>
      <text:p text:style-name="Text_20_body"><text:span text:style-name="Strong_20_Emphasis"><text:span text:style-name="T1">request </text:span></text:span><text:span text:style-name="Strong_20_Emphasis"><text:span text:style-name="T6">pavzdys</text:span></text:span><text:span text:style-name="Strong_20_Emphasis"><text:span text:style-name="T1">:</text:span></text:span></text:p>
      <text:p text:style-name="Preformatted_20_Text"><text:span text:style-name="Source_20_Text"><text:span text:style-name="T1">curl -X POST http://localhost:8080/query \</text:span></text:span></text:p>
      <text:p text:style-name="Preformatted_20_Text"><text:span text:style-name="Source_20_Text"><text:span text:style-name="T1"><text:s text:c="2"/>-H "Content-Type: application/json" \</text:span></text:span></text:p>
      <text:p text:style-name="Preformatted_20_Text"><text:span text:style-name="Source_20_Text"><text:span text:style-name="T1"><text:s text:c="2"/>-d "{</text:span></text:span></text:p>
      <text:p text:style-name="Preformatted_20_Text"><text:span text:style-name="Source_20_Text"><text:span text:style-name="T1"><text:s text:c="4"/>\"sequence\": \"$(sed -n '2p' data/shard_1.fasta)\",</text:span></text:span></text:p>
      <text:p text:style-name="Preformatted_20_Text"><text:span text:style-name="Source_20_Text"><text:span text:style-name="T1"><text:s text:c="4"/>\"query_id\": \"real_test\",</text:span></text:span></text:p>
      <text:p text:style-name="Preformatted_20_Text"><text:span text:style-name="Source_20_Text"><text:span text:style-name="T1"><text:s text:c="4"/>\"top_n\": 3</text:span></text:span></text:p>
      <text:p text:style-name="P1"><text:span text:style-name="Source_20_Text"><text:span text:style-name="T1"><text:s text:c="2"/>}"</text:span></text:span></text:p>
      <text:p text:style-name="Text_20_body"><text:span text:style-name="Strong_20_Emphasis"><text:span text:style-name="T1">response </text:span></text:span><text:span text:style-name="Strong_20_Emphasis"><text:span text:style-name="T6">pavyzdys</text:span></text:span><text:span text:style-name="Strong_20_Emphasis"><text:span text:style-name="T1">: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4"/>"query_id": "real_test",</text:span></text:span></text:p>
      <text:p text:style-name="Preformatted_20_Text"><text:span text:style-name="Source_20_Text"><text:span text:style-name="T1"><text:s text:c="4"/>"query_length": 150,</text:span></text:span></text:p>
      <text:p text:style-name="Preformatted_20_Text"><text:span text:style-name="Source_20_Text"><text:span text:style-name="T1"><text:s text:c="4"/>"workers_queried": 4,</text:span></text:span></text:p>
      <text:p text:style-name="Preformatted_20_Text"><text:span text:style-name="Source_20_Text"><text:span text:style-name="T1"><text:s text:c="4"/>"worker_stats": [</text:span></text:span></text:p>
      <text:p text:style-name="Preformatted_20_Text"><text:span text:style-name="Source_20_Text"><text:span text:style-name="T1"><text:s text:c="8"/>{"worker_url": "http://worker1:8000", "candidates_found": 7, "search_time_seconds": 99.771},</text:span></text:span></text:p>
      <text:p text:style-name="Preformatted_20_Text"><text:span text:style-name="Source_20_Text"><text:span text:style-name="T1"><text:s text:c="8"/>{"worker_url": "http://worker2:8000", "candidates_found": 5, "search_time_seconds": 99.767},</text:span></text:span></text:p>
      <text:p text:style-name="Preformatted_20_Text"><text:span text:style-name="Source_20_Text"><text:span text:style-name="T1"><text:s text:c="8"/>{"worker_url": "http://worker3:8000", "candidates_found": 2, "search_time_seconds": 99.739},</text:span></text:span></text:p>
      <text:p text:style-name="Preformatted_20_Text"><text:span text:style-name="Source_20_Text"><text:span text:style-name="T1"><text:s text:c="8"/>{"worker_url": "http://worker4:8000", "candidates_found": 4, "search_time_seconds": 99.753}</text:span></text:span></text:p>
      <text:p text:style-name="Preformatted_20_Text"><text:span text:style-name="Source_20_Text"><text:span text:style-name="T1"><text:s text:c="4"/>],</text:span></text:span></text:p>
      <text:p text:style-name="Preformatted_20_Text"><text:span text:style-name="Source_20_Text"><text:span text:style-name="T1"><text:s text:c="4"/>"candidates_after_dedup": 17,</text:span></text:span></text:p>
      <text:p text:style-name="Preformatted_20_Text"><text:span text:style-name="Source_20_Text"><text:span text:style-name="T1"><text:s text:c="4"/>"hits": [...],</text:span></text:span></text:p>
      <text:p text:style-name="Preformatted_20_Text"><text:span text:style-name="Source_20_Text"><text:span text:style-name="T1"><text:s text:c="4"/>"report": "====================================================</text:span></text:span></text:p>
      <text:p text:style-name="Preformatted_20_Text"><text:span text:style-name="Source_20_Text"><text:span text:style-name="T1">DISTRIBUTED BLAST PIPELINE REPORT</text:span></text:span></text:p>
      <text:p text:style-name="Preformatted_20_Text"><text:span text:style-name="Source_20_Text"><text:span text:style-name="T1">====================================================</text:span></text:span></text:p>
      <text:p text:style-name="Preformatted_20_Text"><text:span text:style-name="Source_20_Text"><text:span text:style-name="T1">Query ID: <text:s text:c="7"/>real_test</text:span></text:span></text:p>
      <text:p text:style-name="Preformatted_20_Text"><text:span text:style-name="Source_20_Text"><text:span text:style-name="T1">Query length: <text:s text:c="3"/>150 bp</text:span></text:span></text:p>
      <text:p text:style-name="Preformatted_20_Text"><text:span text:style-name="Source_20_Text"><text:span text:style-name="T1">Nodes queried: <text:s text:c="2"/>4</text:span></text:span></text:p>
      <text:p text:style-name="P4"/>
      <text:p text:style-name="Preformatted_20_Text"><text:span text:style-name="Source_20_Text"><text:span text:style-name="T1">WORKER STATISTICS</text:span></text:span></text:p>
      <text:p text:style-name="Preformatted_20_Text"><text:span text:style-name="Source_20_Text"><text:span text:style-name="T1">-----------------</text:span></text:span></text:p>
      <text:p text:style-name="Preformatted_20_Text"><text:span text:style-name="Source_20_Text"><text:span text:style-name="T1"><text:s text:c="2"/>http://worker1:8000: 7 candidates (99.771s)</text:span></text:span></text:p>
      <text:p text:style-name="Preformatted_20_Text"><text:span text:style-name="Source_20_Text"><text:span text:style-name="T1"><text:s text:c="2"/>http://worker2:8000: 5 candidates (99.767s)</text:span></text:span></text:p>
      <text:p text:style-name="Preformatted_20_Text"><text:span text:style-name="Source_20_Text"><text:span text:style-name="T1"><text:s text:c="2"/>http://worker3:8000: 2 candidates (99.739s)</text:span></text:span></text:p>
      <text:p text:style-name="Preformatted_20_Text"><text:span text:style-name="Source_20_Text"><text:span text:style-name="T1"><text:s text:c="2"/>http://worker4:8000: 4 candidates (99.753s)</text:span></text:span></text:p>
      <text:p text:style-name="P4"/>
      <text:p text:style-name="Preformatted_20_Text"><text:span text:style-name="Source_20_Text"><text:span text:style-name="T1">Total candidates after deduplication: 17</text:span></text:span></text:p>
      <text:p text:style-name="P4"/>
      <text:p text:style-name="Preformatted_20_Text"><text:span text:style-name="Source_20_Text"><text:span text:style-name="T1">TOP 3 HITS (sorted by E-value)</text:span></text:span></text:p>
      <text:p text:style-name="Preformatted_20_Text"><text:span text:style-name="Source_20_Text"><text:span text:style-name="T1">-------------------------------</text:span></text:span></text:p>
      <text:p text:style-name="Preformatted_20_Text"><text:span text:style-name="Source_20_Text"><text:span text:style-name="T1">1. SRR2584863.1</text:span></text:span></text:p>
      <text:p text:style-name="Preformatted_20_Text"><text:span text:style-name="Source_20_Text"><text:span text:style-name="T1"><text:s text:c="3"/>Identity: 100.0% | Length: 150 | E-value: 6.23e-79 | Score: 278.0</text:span></text:span></text:p>
      <text:p text:style-name="Preformatted_20_Text"><text:span text:style-name="Source_20_Text"><text:span text:style-name="T1">2. SRR2584863.377504</text:span></text:span></text:p>
      <text:p text:style-name="Preformatted_20_Text"><text:span text:style-name="Source_20_Text"><text:span text:style-name="T1"><text:s text:c="3"/>Identity: 100.0% | Length: 148 | E-value: 8.06e-78 | Score: 274.0</text:span></text:span></text:p>
      <text:p text:style-name="Preformatted_20_Text"><text:span text:style-name="Source_20_Text"><text:span text:style-name="T1">3. SRR2584863.140792</text:span></text:span></text:p>
      <text:p text:style-name="Preformatted_20_Text"><text:span text:style-name="Source_20_Text"><text:span text:style-name="T1"><text:s text:c="3"/>Identity: 100.0% | Length: 138 | E-value: 2.92e-72 | Score: 255.0</text:span></text:span></text:p>
      <text:p text:style-name="P4"/>
      <text:p text:style-name="Preformatted_20_Text"><text:span text:style-name="Source_20_Text"><text:span text:style-name="T1">NOTE: E-values are relative to the candidate pool size, not the full</text:span></text:span></text:p>
      <text:p text:style-name="Preformatted_20_Text"><text:span text:style-name="Source_20_Text"><text:span text:style-name="T1">dataset. Rankings are valid but absolute values are not comparable to</text:span></text:span></text:p>
      <text:p text:style-name="Preformatted_20_Text"><text:span text:style-name="Source_20_Text"><text:span text:style-name="T1">standard full-database BLAST results.</text:span></text:span></text:p>
      <text:p text:style-name="Preformatted_20_Text"><text:span text:style-name="Source_20_Text"><text:span text:style-name="T1">====================================================",</text:span></text:span></text:p>
      <text:p text:style-name="Preformatted_20_Text"><text:span text:style-name="Source_20_Text"><text:span text:style-name="T1"><text:s text:c="4"/>"total_pipeline_time_seconds": 100.501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1"/></text:span></text:p>
      <text:p text:style-name="P41"><text:span text:style-name="T1"/></text:p>
      <text:h text:style-name="Heading_20_3" text:outline-level="3"><text:span text:style-name="Strong_20_Emphasis">Pirminio filtro pasirinkimas </text:span><text:span text:style-name="Strong_20_Emphasis"><text:span text:style-name="T22">darbiniuose mazguose</text:span></text:span><text:span text:style-name="Strong_20_Emphasis">, svarstytos alternatyvos</text:span></text:h>
      <text:list text:style-name="L8">
        <text:list-item>
          <text:p text:style-name="P38"><text:span text:style-name="Strong_20_Emphasis"><text:span text:style-name="T7">Minimap2</text:span></text:span><text:span text:style-name="T7"> - </text:span><text:span text:style-name="T8">palaiko reikiamas paieškas, bet labiau skirtas ilgų sekų išlyginimui. Orientuotas į tai, kur seka genome, o ne kokia tai seka duomenų bazėje.</text:span></text:p>
        </text:list-item>
        <text:list-item>
          <text:p text:style-name="P37"><text:span text:style-name="Strong_20_Emphasis"><text:span text:style-name="T7">grep/grepq</text:span></text:span><text:span text:style-name="T7"> </text:span><text:span text:style-name="T8">–</text:span><text:span text:style-name="T7"> </text:span><text:span text:style-name="T8">nors labai lengvi, neturi pakankamai lankstumo, ypač su insercijomis, delecijomis.</text:span></text:p>
        </text:list-item>
        <text:list-item>
          <text:p text:style-name="P37"><text:span text:style-name="Strong_20_Emphasis"><text:span text:style-name="T7">BLAST</text:span></text:span><text:span text:style-name="T7"> – </text:span><text:span text:style-name="T8">didelis, lėtas.</text:span></text:p>
        </text:list-item>
        <text:list-item>
          <text:p text:style-name="P36"><text:span text:style-name="Strong_20_Emphasis"><text:span text:style-name="T7">MMseqs2</text:span></text:span><text:span text:style-name="T7"> – </text:span><text:span text:style-name="T8">lengvas, lankstus, itin greitas.</text:span></text:p>
        </text:list-item>
      </text:list>
      <text:p text:style-name="P3"><text:span text:style-name="Strong_20_Emphasis"><text:span text:style-name="T1"/></text:span></text:p>
      <text:h text:style-name="P9" text:outline-level="3">Bandomieji duomenys</text:h>
      <text:p text:style-name="P42"><text:span text:style-name="T22">Naudoti E. coli genomo duomenys </text:span><text:span text:style-name="T10">(accession SRR2584863). 150Bp sekos, </text:span><text:span text:style-name="T9">jų buvo apie 1.5 milijono, panaudota 400 tūkstančių. Jie paskirstyti per 4 darbinius mazgus po 100 tūkstančių.</text:span></text:p>
      <text:p text:style-name="P42"><text:span text:style-name="T9"/></text:p>
      <text:h text:style-name="P10" text:outline-level="3">Žinomos problemos ir patobulinimai</text:h>
      <text:h text:style-name="P13" text:outline-level="4">Problemos</text:h>
      <text:list text:style-name="L9">
        <text:list-item>
          <text:p text:style-name="P43">Jei MMSeqs2 createindex paleidžiamas Docker aplinkoje, sistema pradeda lūžinėti dėl atminties trūkumo.</text:p>
        </text:list-item>
        <text:list-item>
          <text:p text:style-name="P43">Docker <text:span text:style-name="T24">Desktop</text:span> aplinkoje vienos užklausos apdorojimas užtrunka apie 100s, Docker nenaudojant apie <text:span text:style-name="T24">16</text:span>s. <text:span text:style-name="T24">Rezultatai identiški</text:span></text:p>
        </text:list-item>
        <text:list-item>
          <text:p text:style-name="P43">E-value reikšmės iš galutinio BLAST yra neįtikėtinai geros. Taip nutinka, nes lyginami tik pirminio filtro atsijoti kandidatai.</text:p>
        </text:list-item>
        <text:list-item>
          <text:p text:style-name="P43">Kodas asynchroniškas, tačiau nėra apsaugų nuo vartotojų, kurie galėtų siųsti daug užklausų ir greitai nulaužti sistemą.</text:p>
        </text:list-item>
      </text:list>
      <text:h text:style-name="P13" text:outline-level="4">Svarstomi patobulinimai antrai versijai</text:h>
      <text:list text:style-name="L10">
        <text:list-item>
          <text:p text:style-name="P44">Nereikalauti vartotojo rankinio FASTQ→FASTA konvertavimo. Daryti tai pagal poreikį dinamiškai kode.</text:p>
        </text:list-item>
        <text:list-item>
          <text:p text:style-name="P45">Pirmoje versijoje jau galima paleisti kitokį kiekį darbinių mazgų negu 4 nustatant aplinkos kintamąjį WORKERS, tačiau reiktų sugalvoti sprendimą su duomenų užpildymu, kadangi dabar viskas paruošta lygiai keturiems.</text:p>
        </text:list-item>
        <text:list-item>
          <text:p text:style-name="P45">Automatiniai testai su Pytest.</text:p>
        </text:list-item>
        <text:list-item>
          <text:p text:style-name="P45">Paprasta WEB sąsaja. Jau naudojamas FastAPI, todėl tai nebūtų sunku.</text:p>
        </text:list-item>
        <text:list-item>
          <text:p text:style-name="P47">Pabandyti Docker be Docker Desktop.</text:p>
        </text:list-item>
        <text:list-item>
          <text:p text:style-name="P48">Diagrama dokumentacija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20:57:18.243847194</meta:creation-date>
    <dc:date>2026-04-26T21:48:40.241246779</dc:date>
    <meta:editing-duration>PT10H4M13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7" meta:paragraph-count="141" meta:word-count="792" meta:character-count="6514" meta:non-whitespace-character-count="5703"/>
  </office:meta>
</office:document-meta>
</file>